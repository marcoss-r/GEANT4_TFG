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A40000011FC67C7245955B6CB4.png" manifest:media-type="image/png"/>
  <manifest:file-entry manifest:full-path="Pictures/10000201000000C500000129AF114106CF31CEC4.png" manifest:media-type="image/png"/>
  <manifest:file-entry manifest:full-path="Pictures/100002010000016E0000018FF85A9A5AF8E8BC83.png" manifest:media-type="image/png"/>
  <manifest:file-entry manifest:full-path="Pictures/10000201000001CE00000137D4B1300D18365DC2.png" manifest:media-type="image/png"/>
  <manifest:file-entry manifest:full-path="Pictures/10000201000001640000012FFE46ADBC30A03B46.png" manifest:media-type="image/png"/>
  <manifest:file-entry manifest:full-path="Pictures/100002010000018100000147C9A87451E74F8E7A.png" manifest:media-type="image/png"/>
  <manifest:file-entry manifest:full-path="Pictures/10000201000001C5000001725BA44DD4E5946EB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2.3953in" svg:y="-0.061in" svg:width="3.8126in" svg:height="4.1563in" draw:z-index="0"><draw:image xlink:href="Pictures/100002010000016E0000018FF85A9A5AF8E8BC83.png" xlink:type="simple" xlink:show="embed" xlink:actuate="onLoad" loext:mime-type="image/x-vclgraphic"/></draw:frame><draw:frame draw:style-name="fr1" draw:name="Image2" text:anchor-type="paragraph" svg:x="-0.2228in" svg:y="0.1736in" svg:width="2.052in" svg:height="3.0937in" draw:z-index="1"><draw:image xlink:href="Pictures/10000201000000C500000129AF114106CF31CEC4.png" xlink:type="simple" xlink:show="embed" xlink:actuate="onLoad" loext:mime-type="image/x-vclgraphic"/></draw:frame><draw:frame draw:style-name="fr1" draw:name="Image3" text:anchor-type="paragraph" svg:x="-0.8201in" svg:y="4.9654in" svg:width="4.0102in" svg:height="3.4063in" draw:z-index="2"><draw:image xlink:href="Pictures/100002010000018100000147C9A87451E74F8E7A.png" xlink:type="simple" xlink:show="embed" xlink:actuate="onLoad" loext:mime-type="image/x-vclgraphic"/></draw:frame><draw:frame draw:style-name="fr1" draw:name="Image4" text:anchor-type="paragraph" svg:x="2.0681in" svg:y="7.6661in" svg:width="4.8126in" svg:height="3.2398in" draw:z-index="3"><draw:image xlink:href="Pictures/10000201000001CE00000137D4B1300D18365DC2.png" xlink:type="simple" xlink:show="embed" xlink:actuate="onLoad" loext:mime-type="image/x-vclgraphic"/></draw:frame><draw:frame draw:style-name="fr1" draw:name="Image5" text:anchor-type="paragraph" svg:x="2.7618in" svg:y="3.8126in" svg:width="4.7189in" svg:height="3.8543in" draw:z-index="4"><draw:image xlink:href="Pictures/10000201000001C5000001725BA44DD4E5946EBD.png" xlink:type="simple" xlink:show="embed" xlink:actuate="onLoad" loext:mime-type="image/x-vclgraphic"/></draw:frame><draw:frame draw:style-name="fr1" draw:name="Image6" text:anchor-type="paragraph" svg:x="0.6575in" svg:y="2.2634in" svg:width="4.1736in" svg:height="3.8646in" draw:z-index="5"><draw:image xlink:href="Pictures/10000201000001640000012FFE46ADBC30A03B46.png" xlink:type="simple" xlink:show="embed" xlink:actuate="onLoad" loext:mime-type="image/x-vclgraphic"/></draw:frame><draw:frame draw:style-name="fr1" draw:name="Image7" text:anchor-type="paragraph" svg:x="2.3953in" svg:y="3.1382in" svg:width="4.3752in" svg:height="2.9898in" draw:z-index="6"><draw:image xlink:href="Pictures/10000201000001A40000011FC67C7245955B6CB4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4-13T16:21:32.513438785</meta:creation-date>
    <dc:date>2026-04-13T16:55:36.626286765</dc:date>
    <meta:editing-duration>PT12M53S</meta:editing-duration>
    <meta:editing-cycles>1</meta:editing-cycles>
    <meta:document-statistic meta:table-count="0" meta:image-count="7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